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Preformatted_20_Text">
      <style:paragraph-properties fo:margin-left="0cm" fo:margin-right="0cm" fo:text-indent="0cm" style:auto-text-indent="false"/>
    </style:style>
    <style:style style:name="P30" style:family="paragraph" style:parent-style-name="Preformatted_20_Text">
      <style:paragraph-properties fo:margin-top="0cm" fo:margin-bottom="0.499cm" style:contextual-spacing="false"/>
    </style:style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1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2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ision globale</text:h>
      <text:p text:style-name="Text_20_body">Votre application Angular pourrait gérer :</text:p>
      <text:h text:style-name="Heading_20_3" text:outline-level="3">1. Inventaire matériel</text:h>
      <text:list text:style-name="L1">
        <text:list-item>
          <text:p text:style-name="P1">PC portables et fixes </text:p>
        </text:list-item>
        <text:list-item>
          <text:p text:style-name="P1">Serveurs </text:p>
        </text:list-item>
        <text:list-item>
          <text:p text:style-name="P1">Imprimantes </text:p>
        </text:list-item>
        <text:list-item>
          <text:p text:style-name="P1">Onduleurs (UPS) </text:p>
        </text:list-item>
        <text:list-item>
          <text:p text:style-name="P1">Switchs </text:p>
        </text:list-item>
        <text:list-item>
          <text:p text:style-name="P1">Routeurs </text:p>
        </text:list-item>
        <text:list-item>
          <text:p text:style-name="P1">Téléphones IP </text:p>
        </text:list-item>
        <text:list-item>
          <text:p text:style-name="P1">Écrans </text:p>
        </text:list-item>
        <text:list-item>
          <text:p text:style-name="P2">Accessoires (claviers, souris, casques) </text:p>
        </text:list-item>
      </text:list>
      <text:p text:style-name="Text_20_body">Informations stockées :</text:p>
      <text:list text:style-name="L2">
        <text:list-item>
          <text:p text:style-name="P3">Numéro d'inventaire </text:p>
        </text:list-item>
        <text:list-item>
          <text:p text:style-name="P3">Marque / modèle </text:p>
        </text:list-item>
        <text:list-item>
          <text:p text:style-name="P3">Numéro de série </text:p>
        </text:list-item>
        <text:list-item>
          <text:p text:style-name="P3">Date d'acquisition </text:p>
        </text:list-item>
        <text:list-item>
          <text:p text:style-name="P3">Fournisseur </text:p>
        </text:list-item>
        <text:list-item>
          <text:p text:style-name="P3">Garantie </text:p>
        </text:list-item>
        <text:list-item>
          <text:p text:style-name="P3">État du matériel </text:p>
        </text:list-item>
        <text:list-item>
          <text:p text:style-name="P3">Localisation </text:p>
        </text:list-item>
        <text:list-item>
          <text:p text:style-name="P3">Collaborateur affecté </text:p>
        </text:list-item>
        <text:list-item>
          <text:p text:style-name="P4">Historique des affectations </text:p>
        </text:list-item>
      </text:list>
      <text:p text:style-name="Horizontal_20_Line"/>
      <text:h text:style-name="Heading_20_3" text:outline-level="3">2. Inventaire logiciel</text:h>
      <text:list text:style-name="L3">
        <text:list-item>
          <text:p text:style-name="P5">Logiciels installés </text:p>
        </text:list-item>
        <text:list-item>
          <text:p text:style-name="P5">Version </text:p>
        </text:list-item>
        <text:list-item>
          <text:p text:style-name="P5">Éditeur </text:p>
        </text:list-item>
        <text:list-item>
          <text:p text:style-name="P5">Date d'installation </text:p>
        </text:list-item>
        <text:list-item>
          <text:p text:style-name="P5">Machines concernées </text:p>
        </text:list-item>
        <text:list-item>
          <text:p text:style-name="P6">Niveau de criticité </text:p>
        </text:list-item>
      </text:list>
      <text:p text:style-name="Text_20_body">Exemples :</text:p>
      <text:list text:style-name="L4">
        <text:list-item>
          <text:p text:style-name="P7">Microsoft Office </text:p>
        </text:list-item>
        <text:list-item>
          <text:p text:style-name="P7">Adobe Acrobat </text:p>
        </text:list-item>
        <text:list-item>
          <text:p text:style-name="P7">AutoCAD </text:p>
        </text:list-item>
        <text:list-item>
          <text:p text:style-name="P7">Visual Studio </text:p>
        </text:list-item>
        <text:list-item>
          <text:p text:style-name="P7">Antivirus </text:p>
        </text:list-item>
        <text:list-item>
          <text:p text:style-name="P8">Outils métiers </text:p>
        </text:list-item>
      </text:list>
      <text:p text:style-name="Horizontal_20_Line"/>
      <text:h text:style-name="Heading_20_3" text:outline-level="3"><text:soft-page-break/>3. Gestion des licences</text:h>
      <text:list text:style-name="L5">
        <text:list-item>
          <text:p text:style-name="P9">Nombre de licences achetées </text:p>
        </text:list-item>
        <text:list-item>
          <text:p text:style-name="P9">Nombre utilisées </text:p>
        </text:list-item>
        <text:list-item>
          <text:p text:style-name="P9">Date d'expiration </text:p>
        </text:list-item>
        <text:list-item>
          <text:p text:style-name="P9">Renouvellement </text:p>
        </text:list-item>
        <text:list-item>
          <text:p text:style-name="P10">Coût </text:p>
        </text:list-item>
      </text:list>
      <text:p text:style-name="Text_20_body">Fonctionnalités :</text:p>
      <text:list text:style-name="L6">
        <text:list-item>
          <text:p text:style-name="P11">Attribution automatique </text:p>
        </text:list-item>
        <text:list-item>
          <text:p text:style-name="P11">Révocation automatique </text:p>
        </text:list-item>
        <text:list-item>
          <text:p text:style-name="P11">Alertes avant expiration </text:p>
        </text:list-item>
        <text:list-item>
          <text:p text:style-name="P12">Respect de la conformité </text:p>
        </text:list-item>
      </text:list>
      <text:p text:style-name="Horizontal_20_Line"/>
      <text:h text:style-name="Heading_20_2" text:outline-level="2">Automatisation recommandée</text:h>
      <text:h text:style-name="Heading_20_3" text:outline-level="3">Découverte automatique des postes</text:h>
      <text:p text:style-name="Text_20_body">Au lieu de saisir les équipements manuellement :</text:p>
      <text:p text:style-name="Text_20_body">Agent installé sur les PC :</text:p>
      <text:list text:style-name="L7">
        <text:list-item>
          <text:p text:style-name="P13">Nom machine </text:p>
        </text:list-item>
        <text:list-item>
          <text:p text:style-name="P13">Utilisateur connecté </text:p>
        </text:list-item>
        <text:list-item>
          <text:p text:style-name="P13">Logiciels installés </text:p>
        </text:list-item>
        <text:list-item>
          <text:p text:style-name="P13">Adresse IP </text:p>
        </text:list-item>
        <text:list-item>
          <text:p text:style-name="P13">RAM </text:p>
        </text:list-item>
        <text:list-item>
          <text:p text:style-name="P13">CPU </text:p>
        </text:list-item>
        <text:list-item>
          <text:p text:style-name="P13">Disque </text:p>
        </text:list-item>
        <text:list-item>
          <text:p text:style-name="P14">Version Windows </text:p>
        </text:list-item>
      </text:list>
      <text:p text:style-name="Text_20_body">Technologies possibles :</text:p>
      <text:list text:style-name="L8">
        <text:list-item>
          <text:p text:style-name="P15">Agent .NET </text:p>
        </text:list-item>
        <text:list-item>
          <text:p text:style-name="P15">Agent Python </text:p>
        </text:list-item>
        <text:list-item>
          <text:p text:style-name="P16">Windows Service </text:p>
        </text:list-item>
      </text:list>
      <text:p text:style-name="Text_20_body">L'agent envoie périodiquement les informations à l'API.</text:p>
      <text:p text:style-name="Horizontal_20_Line"/>
      <text:h text:style-name="Heading_20_3" text:outline-level="3">Scan réseau</text:h>
      <text:p text:style-name="Text_20_body">Détection automatique :</text:p>
      <text:list text:style-name="L9">
        <text:list-item>
          <text:p text:style-name="P17">Switch </text:p>
        </text:list-item>
        <text:list-item>
          <text:p text:style-name="P17">Routeurs </text:p>
        </text:list-item>
        <text:list-item>
          <text:p text:style-name="P17">Imprimantes </text:p>
        </text:list-item>
        <text:list-item>
          <text:p text:style-name="P17">Caméras IP </text:p>
        </text:list-item>
        <text:list-item>
          <text:p text:style-name="P18">Onduleurs </text:p>
        </text:list-item>
      </text:list>
      <text:p text:style-name="Text_20_body"><text:soft-page-break/>Protocoles :</text:p>
      <text:list text:style-name="L10">
        <text:list-item>
          <text:p text:style-name="P19">SNMP </text:p>
        </text:list-item>
        <text:list-item>
          <text:p text:style-name="P19">ICMP </text:p>
        </text:list-item>
        <text:list-item>
          <text:p text:style-name="P19">WMI </text:p>
        </text:list-item>
        <text:list-item>
          <text:p text:style-name="P20">SSH </text:p>
        </text:list-item>
      </text:list>
      <text:p text:style-name="Horizontal_20_Line"/>
      <text:h text:style-name="Heading_20_3" text:outline-level="3">Provisionnement automatique des licences</text:h>
      <text:p text:style-name="Text_20_body">Exemple :</text:p>
      <text:p text:style-name="Text_20_body">Nouveau collaborateur créé dans l'annuaire.</text:p>
      <text:p text:style-name="Text_20_body">Workflow :</text:p>
      <text:list text:style-name="L11">
        <text:list-item>
          <text:p text:style-name="P21">Création du compte utilisateur </text:p>
        </text:list-item>
        <text:list-item>
          <text:p text:style-name="P21">Attribution du groupe métier </text:p>
        </text:list-item>
        <text:list-item>
          <text:p text:style-name="P21">Attribution automatique : </text:p>
          <text:list>
            <text:list-item>
              <text:p text:style-name="P21">Microsoft 365 </text:p>
            </text:list-item>
            <text:list-item>
              <text:p text:style-name="P21">Antivirus </text:p>
            </text:list-item>
            <text:list-item>
              <text:p text:style-name="P21">VPN </text:p>
            </text:list-item>
            <text:list-item>
              <text:p text:style-name="P21">Logiciels métier </text:p>
            </text:list-item>
          </text:list>
        </text:list-item>
        <text:list-item>
          <text:p text:style-name="P22">Mise à jour de l'inventaire </text:p>
        </text:list-item>
      </text:list>
      <text:p text:style-name="Horizontal_20_Line"/>
      <text:h text:style-name="Heading_20_3" text:outline-level="3">Révocation automatique</text:h>
      <text:p text:style-name="Text_20_body">Lorsqu'un collaborateur quitte l'entreprise :</text:p>
      <text:list text:style-name="L12">
        <text:list-item>
          <text:p text:style-name="P23">Désactivation du compte </text:p>
        </text:list-item>
        <text:list-item>
          <text:p text:style-name="P23">Révocation des licences </text:p>
        </text:list-item>
        <text:list-item>
          <text:p text:style-name="P23">Libération du matériel </text:p>
        </text:list-item>
        <text:list-item>
          <text:p text:style-name="P24">Retour en stock </text:p>
        </text:list-item>
      </text:list>
      <text:p text:style-name="Horizontal_20_Line"/>
      <text:h text:style-name="Heading_20_2" text:outline-level="2">Architecture recommandée</text:h>
      <text:h text:style-name="Heading_20_3" text:outline-level="3">Frontend</text:h>
      <text:list text:style-name="L13">
        <text:list-item>
          <text:p text:style-name="P25">Angular 20+ </text:p>
        </text:list-item>
        <text:list-item>
          <text:p text:style-name="P25">Angular Material </text:p>
        </text:list-item>
        <text:list-item>
          <text:p text:style-name="P25">NgRx ou Signals Store </text:p>
        </text:list-item>
        <text:list-item>
          <text:p text:style-name="P26">RxJS </text:p>
        </text:list-item>
      </text:list>
      <text:h text:style-name="Heading_20_3" text:outline-level="3">Backend</text:h>
      <text:p text:style-name="Text_20_body">Je recommanderais plutôt :</text:p>
      <text:list text:style-name="L14">
        <text:list-item>
          <text:p text:style-name="P27">NestJS (très compatible Angular) </text:p>
        </text:list-item>
        <text:list-item>
          <text:p text:style-name="P28"><text:soft-page-break/>PostgreSQL </text:p>
        </text:list-item>
      </text:list>
      <text:p text:style-name="Text_20_body">Architecture :</text:p>
      <text:section text:style-name="Sect1" text:name="code-block-viewer">
        <text:p text:style-name="P29"><text:span text:style-name="Source_20_Text">Angular</text:span></text:p>
        <text:p text:style-name="Preformatted_20_Text"><text:span text:style-name="Source_20_Text"><text:s text:c="4"/>|</text:span></text:p>
        <text:p text:style-name="Preformatted_20_Text"><text:span text:style-name="Source_20_Text">NestJS API</text:span></text:p>
        <text:p text:style-name="Preformatted_20_Text"><text:span text:style-name="Source_20_Text"><text:s text:c="4"/>|</text:span></text:p>
        <text:p text:style-name="Preformatted_20_Text"><text:span text:style-name="Source_20_Text">PostgreSQL</text:span></text:p>
        <text:p text:style-name="Preformatted_20_Text"><text:span text:style-name="Source_20_Text"><text:s text:c="4"/>|</text:span></text:p>
        <text:p text:style-name="Preformatted_20_Text"><text:span text:style-name="Source_20_Text">Services métiers</text:span></text:p>
        <text:p text:style-name="Preformatted_20_Text"><text:span text:style-name="Source_20_Text"><text:s text:c="4"/>|</text:span></text:p>
        <text:p text:style-name="P30"><text:span text:style-name="Source_20_Text">Agents + Connecteurs</text:span></text:p>
      </text:section>
      <text:p text:style-name="Horizontal_20_Line"/>
      <text:h text:style-name="Heading_20_2" text:outline-level="2">Modules principaux</text:h>
      <text:h text:style-name="Heading_20_3" text:outline-level="3">Dashboard</text:h>
      <text:p text:style-name="Text_20_body">KPIs :</text:p>
      <text:list text:style-name="L15">
        <text:list-item>
          <text:p text:style-name="P31">Nombre d'actifs </text:p>
        </text:list-item>
        <text:list-item>
          <text:p text:style-name="P31">Licences utilisées </text:p>
        </text:list-item>
        <text:list-item>
          <text:p text:style-name="P31">Licences disponibles </text:p>
        </text:list-item>
        <text:list-item>
          <text:p text:style-name="P31">Matériels en panne </text:p>
        </text:list-item>
        <text:list-item>
          <text:p text:style-name="P32">Garanties expirant bientôt </text:p>
        </text:list-item>
      </text:list>
      <text:p text:style-name="Horizontal_20_Line"/>
      <text:h text:style-name="Heading_20_3" text:outline-level="3">Gestion des collaborateurs</text:h>
      <text:section text:style-name="Sect1" text:name="Section1">
        <text:p text:style-name="P29"><text:bookmark text:name="code-block-viewer"/><text:span text:style-name="Source_20_Text">Collaborateur</text:span></text:p>
        <text:p text:style-name="Preformatted_20_Text"><text:span text:style-name="Source_20_Text"><text:s/>├─ Département</text:span></text:p>
        <text:p text:style-name="Preformatted_20_Text"><text:span text:style-name="Source_20_Text"><text:s/>├─ Manager</text:span></text:p>
        <text:p text:style-name="Preformatted_20_Text"><text:span text:style-name="Source_20_Text"><text:s/>├─ Matériels attribués</text:span></text:p>
        <text:p text:style-name="Preformatted_20_Text"><text:span text:style-name="Source_20_Text"><text:s/>├─ Logiciels attribués</text:span></text:p>
        <text:p text:style-name="P30"><text:span text:style-name="Source_20_Text"><text:s/>└─ Licences attribuées</text:span></text:p>
      </text:section>
      <text:p text:style-name="Horizontal_20_Line"/>
      <text:h text:style-name="Heading_20_3" text:outline-level="3">Gestion du stock</text:h>
      <text:section text:style-name="Sect1" text:name="Section2">
        <text:p text:style-name="P29"><text:bookmark text:name="code-block-viewer Copie 1"/><text:span text:style-name="Source_20_Text">En stock</text:span></text:p>
        <text:p text:style-name="Preformatted_20_Text"><text:span text:style-name="Source_20_Text">En maintenance</text:span></text:p>
        <text:p text:style-name="Preformatted_20_Text"><text:span text:style-name="Source_20_Text">Attribué</text:span></text:p>
        <text:p text:style-name="Preformatted_20_Text"><text:span text:style-name="Source_20_Text">Perdu</text:span></text:p>
        <text:p text:style-name="P30"><text:span text:style-name="Source_20_Text">Réformé</text:span></text:p>
      </text:section>
      <text:p text:style-name="Horizontal_20_Line"/>
      <text:h text:style-name="Heading_20_3" text:outline-level="3">Workflow de demande</text:h>
      <text:p text:style-name="Text_20_body">Exemple :</text:p>
      <text:p text:style-name="Text_20_body">Demande d'un ordinateur portable.</text:p>
      <text:section text:style-name="Sect1" text:name="Section3">
        <text:p text:style-name="P29"><text:bookmark text:name="code-block-viewer Copie 2"/><text:span text:style-name="Source_20_Text">Employé</text:span></text:p>
        <text:p text:style-name="Preformatted_20_Text"><text:soft-page-break/><text:span text:style-name="Source_20_Text"><text:s text:c="3"/>↓</text:span></text:p>
        <text:p text:style-name="Preformatted_20_Text"><text:span text:style-name="Source_20_Text">Manager</text:span></text:p>
        <text:p text:style-name="Preformatted_20_Text"><text:span text:style-name="Source_20_Text"><text:s text:c="3"/>↓</text:span></text:p>
        <text:p text:style-name="Preformatted_20_Text"><text:span text:style-name="Source_20_Text">IT</text:span></text:p>
        <text:p text:style-name="Preformatted_20_Text"><text:span text:style-name="Source_20_Text"><text:s text:c="3"/>↓</text:span></text:p>
        <text:p text:style-name="P30"><text:span text:style-name="Source_20_Text">Attribution automatique</text:span></text:p>
      </text:section>
      <text:p text:style-name="Horizontal_20_Line"/>
      <text:h text:style-name="Heading_20_3" text:outline-level="3">Audit</text:h>
      <text:p text:style-name="Text_20_body">Historisation complète :</text:p>
      <text:list text:style-name="L16">
        <text:list-item>
          <text:p text:style-name="P33">Qui a modifié quoi </text:p>
        </text:list-item>
        <text:list-item>
          <text:p text:style-name="P33">Quand </text:p>
        </text:list-item>
        <text:list-item>
          <text:p text:style-name="P33">Ancienne valeur </text:p>
        </text:list-item>
        <text:list-item>
          <text:p text:style-name="P34">Nouvelle valeur </text:p>
        </text:list-item>
      </text:list>
      <text:p text:style-name="Horizontal_20_Line"/>
      <text:h text:style-name="Heading_20_2" text:outline-level="2">Base de données simplifiée</text:h>
      <text:section text:style-name="Sect1" text:name="Section4">
        <text:p text:style-name="P29"><text:bookmark text:name="code-block-viewer Copie 3"/><text:span text:style-name="Source_20_Text">users</text:span></text:p>
        <text:p text:style-name="Preformatted_20_Text"><text:span text:style-name="Source_20_Text">departments</text:span></text:p>
        <text:p text:style-name="Preformatted_20_Text"><text:span text:style-name="Source_20_Text">assets</text:span></text:p>
        <text:p text:style-name="Preformatted_20_Text"><text:span text:style-name="Source_20_Text">asset_types</text:span></text:p>
        <text:p text:style-name="Preformatted_20_Text"><text:span text:style-name="Source_20_Text">software</text:span></text:p>
        <text:p text:style-name="Preformatted_20_Text"><text:span text:style-name="Source_20_Text">licenses</text:span></text:p>
        <text:p text:style-name="Preformatted_20_Text"><text:span text:style-name="Source_20_Text">assignments</text:span></text:p>
        <text:p text:style-name="Preformatted_20_Text"><text:span text:style-name="Source_20_Text">suppliers</text:span></text:p>
        <text:p text:style-name="Preformatted_20_Text"><text:span text:style-name="Source_20_Text">purchases</text:span></text:p>
        <text:p text:style-name="P30"><text:span text:style-name="Source_20_Text">audit_logs</text:span></text:p>
      </text:section>
      <text:p text:style-name="Text_20_body">Relations :</text:p>
      <text:section text:style-name="Sect1" text:name="Section5">
        <text:p text:style-name="P29"><text:bookmark text:name="code-block-viewer Copie 4"/><text:span text:style-name="Source_20_Text">User</text:span></text:p>
        <text:p text:style-name="Preformatted_20_Text"><text:span text:style-name="Source_20_Text"><text:s/>├─ Assets</text:span></text:p>
        <text:p text:style-name="Preformatted_20_Text"><text:span text:style-name="Source_20_Text"><text:s/>├─ Software</text:span></text:p>
        <text:p text:style-name="Preformatted_20_Text"><text:span text:style-name="Source_20_Text"><text:s/>└─ Licenses</text:span></text:p>
        <text:p text:style-name="Preformatted_20_Text"><text:span text:style-name="Source_20_Text">Asset</text:span></text:p>
        <text:p text:style-name="Preformatted_20_Text"><text:span text:style-name="Source_20_Text"><text:s/>├─ Type</text:span></text:p>
        <text:p text:style-name="Preformatted_20_Text"><text:span text:style-name="Source_20_Text"><text:s/>├─ Location</text:span></text:p>
        <text:p text:style-name="P30"><text:span text:style-name="Source_20_Text"><text:s/>└─ Owner</text:span></text:p>
      </text:section>
      <text:p text:style-name="Horizontal_20_Line"/>
      <text:h text:style-name="Heading_20_2" text:outline-level="2">Fonctionnalités avancées pour 600+ collaborateurs</text:h>
      <text:h text:style-name="Heading_20_3" text:outline-level="3">Intégration Active Directory / LDAP</text:h>
      <text:p text:style-name="Text_20_body">Permet :</text:p>
      <text:list text:style-name="L17">
        <text:list-item>
          <text:p text:style-name="P35">Synchronisation des utilisateurs </text:p>
        </text:list-item>
        <text:list-item>
          <text:p text:style-name="P35">Groupes </text:p>
        </text:list-item>
        <text:list-item>
          <text:p text:style-name="P36">Désactivation automatique </text:p>
        </text:list-item>
      </text:list>
      <text:p text:style-name="Horizontal_20_Line"/>
      <text:h text:style-name="Heading_20_3" text:outline-level="3"><text:soft-page-break/>SSO</text:h>
      <text:p text:style-name="Text_20_body">Connexion via :</text:p>
      <text:list text:style-name="L18">
        <text:list-item>
          <text:p text:style-name="P37">Microsoft Entra ID (Azure AD) </text:p>
        </text:list-item>
        <text:list-item>
          <text:p text:style-name="P37">LDAP </text:p>
        </text:list-item>
        <text:list-item>
          <text:p text:style-name="P38">Keycloak </text:p>
        </text:list-item>
      </text:list>
      <text:p text:style-name="Horizontal_20_Line"/>
      <text:h text:style-name="Heading_20_3" text:outline-level="3">Gestion multi-sites</text:h>
      <text:section text:style-name="Sect1" text:name="Section6">
        <text:p text:style-name="P29"><text:bookmark text:name="code-block-viewer Copie 5"/><text:span text:style-name="Source_20_Text">Siège</text:span></text:p>
        <text:p text:style-name="Preformatted_20_Text"><text:span text:style-name="Source_20_Text">Agence A</text:span></text:p>
        <text:p text:style-name="Preformatted_20_Text"><text:span text:style-name="Source_20_Text">Agence B</text:span></text:p>
        <text:p text:style-name="P30"><text:span text:style-name="Source_20_Text">Datacenter</text:span></text:p>
      </text:section>
      <text:p text:style-name="Horizontal_20_Line"/>
      <text:h text:style-name="Heading_20_3" text:outline-level="3">Alertes</text:h>
      <text:list text:style-name="L19">
        <text:list-item>
          <text:p text:style-name="P39">Garantie expirée </text:p>
        </text:list-item>
        <text:list-item>
          <text:p text:style-name="P39">Licence expirée </text:p>
        </text:list-item>
        <text:list-item>
          <text:p text:style-name="P39">Stock faible </text:p>
        </text:list-item>
        <text:list-item>
          <text:p text:style-name="P40">Matériel non vu depuis 30 jours </text:p>
        </text:list-item>
      </text:list>
      <text:p text:style-name="Horizontal_20_Line"/>
      <text:h text:style-name="Heading_20_3" text:outline-level="3">Reporting</text:h>
      <text:p text:style-name="Text_20_body">Exports :</text:p>
      <text:list text:style-name="L20">
        <text:list-item>
          <text:p text:style-name="P41">Excel </text:p>
        </text:list-item>
        <text:list-item>
          <text:p text:style-name="P41">PDF </text:p>
        </text:list-item>
        <text:list-item>
          <text:p text:style-name="P42">CSV </text:p>
        </text:list-item>
      </text:list>
      <text:p text:style-name="Text_20_body">Rapports :</text:p>
      <text:list text:style-name="L21">
        <text:list-item>
          <text:p text:style-name="P43">Inventaire complet </text:p>
        </text:list-item>
        <text:list-item>
          <text:p text:style-name="P43">Coûts par département </text:p>
        </text:list-item>
        <text:list-item>
          <text:p text:style-name="P43">Consommation de licences </text:p>
        </text:list-item>
        <text:list-item>
          <text:p text:style-name="P44">Renouvellements à prévoir </text:p>
        </text:list-item>
      </text:list>
      <text:h text:style-name="Heading_20_2" text:outline-level="2">Ce que je ferais dans votre cas</text:h>
      <text:p text:style-name="Text_20_body">Pour une entreprise de 600+ personnes, je partirais sur :</text:p>
      <text:list text:style-name="L22">
        <text:list-item>
          <text:p text:style-name="P45">Angular + Angular Material </text:p>
        </text:list-item>
        <text:list-item>
          <text:p text:style-name="P45">NestJS </text:p>
        </text:list-item>
        <text:list-item>
          <text:p text:style-name="P45">PostgreSQL </text:p>
        </text:list-item>
        <text:list-item>
          <text:p text:style-name="P45">Keycloak (SSO) </text:p>
        </text:list-item>
        <text:list-item>
          <text:p text:style-name="P45">Agent Windows en .NET </text:p>
        </text:list-item>
        <text:list-item>
          <text:p text:style-name="P45">SNMP pour les équipements réseau </text:p>
        </text:list-item>
        <text:list-item>
          <text:p text:style-name="P45">Docker pour le déploiement </text:p>
        </text:list-item>
        <text:list-item>
          <text:p text:style-name="P46"><text:soft-page-break/>API REST (ou GraphQL si nécessaire) </text:p>
        </text:list-item>
      </text:list>
      <text:p text:style-name="Text_20_body">L'objectif serait de construire une plateforme proche des fonctionnalités de solutions comme GLPI ou ManageEngine AssetExplorer, mais adaptée aux processus spécifiques de votre entreprise et à l'automatisation du cycle de vie des licenc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1T13:42:01.365410144</meta:creation-date>
    <dc:date>2026-06-01T13:43:11.126742301</dc:date>
    <meta:editing-duration>PT1M10S</meta:editing-duration>
    <meta:editing-cycles>1</meta:editing-cycles>
    <meta:document-statistic meta:table-count="0" meta:image-count="0" meta:object-count="0" meta:page-count="7" meta:paragraph-count="214" meta:word-count="624" meta:character-count="3811" meta:non-whitespace-character-count="3365"/>
    <meta:generator>LibreOffice/26.2.3.2$Linux_X86_64 LibreOffice_project/d4d5ed47b6084125f28d269a5650105d54dde034</meta:generator>
  </office:meta>
</office:document-meta>
</file>